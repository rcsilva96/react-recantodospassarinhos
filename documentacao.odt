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326" officeooo:paragraph-rsid="001c3326"/>
    </style:style>
    <style:style style:name="P2" style:family="paragraph" style:parent-style-name="Standard">
      <style:paragraph-properties fo:break-before="page"/>
      <style:text-properties officeooo:rsid="001c3326" officeooo:paragraph-rsid="001c3326"/>
    </style:style>
    <style:style style:name="P3" style:family="paragraph" style:parent-style-name="Text_20_body">
      <style:text-properties officeooo:rsid="001c3326" officeooo:paragraph-rsid="001c3326"/>
    </style:style>
    <style:style style:name="P4" style:family="paragraph" style:parent-style-name="Text_20_body" style:list-style-name="L1">
      <style:text-properties officeooo:rsid="001c3326" officeooo:paragraph-rsid="001c3326"/>
    </style:style>
    <style:style style:name="P5" style:family="paragraph" style:parent-style-name="Standard" style:list-style-name="L2">
      <style:text-properties officeooo:rsid="001c3326" officeooo:paragraph-rsid="001c3326"/>
    </style:style>
    <style:style style:name="P6" style:family="paragraph" style:parent-style-name="Standard" style:list-style-name="L3">
      <style:text-properties officeooo:rsid="001c3326" officeooo:paragraph-rsid="001c3326"/>
    </style:style>
    <style:style style:name="P7" style:family="paragraph" style:parent-style-name="Standard" style:list-style-name="L3">
      <style:paragraph-properties fo:break-before="page"/>
      <style:text-properties officeooo:rsid="001c3326" officeooo:paragraph-rsid="001c3326"/>
    </style:style>
    <style:style style:name="P8" style:family="paragraph" style:parent-style-name="Standard" style:list-style-name="L3">
      <style:paragraph-properties fo:break-before="page"/>
      <style:text-properties officeooo:rsid="001d2b6b" officeooo:paragraph-rsid="001d2b6b"/>
    </style:style>
    <style:style style:name="P9" style:family="paragraph" style:parent-style-name="Standard">
      <style:text-properties officeooo:rsid="001d2b6b" officeooo:paragraph-rsid="001d2b6b"/>
    </style:style>
    <style:style style:name="P10" style:family="paragraph" style:parent-style-name="Standard">
      <style:paragraph-properties fo:break-before="page"/>
      <style:text-properties officeooo:rsid="001d2b6b" officeooo:paragraph-rsid="001d2b6b"/>
    </style:style>
    <style:style style:name="P11" style:family="paragraph" style:parent-style-name="Standard">
      <style:paragraph-properties fo:break-before="page"/>
      <style:text-properties officeooo:rsid="001e4911" officeooo:paragraph-rsid="001e4911"/>
    </style:style>
    <style:style style:name="P12" style:family="paragraph" style:parent-style-name="Standard">
      <style:text-properties officeooo:rsid="001e4911" officeooo:paragraph-rsid="001e4911"/>
    </style:style>
    <style:style style:name="T1" style:family="text">
      <style:text-properties officeooo:rsid="001e49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“Recanto dos Passarinhos”</text:p>
      <text:p text:style-name="P2">Bem-vindo ao Recanto dos Passarinhos, um apartamento aconchegante e preparado para proporcionar dias de descanso, lazer e conforto no Guarujá.</text:p>
      <text:p text:style-name="P1"/>
      <text:p text:style-name="P1">Ideal para casais, famílias ou profissionais em home office, o espaço oferece um ambiente tranquilo, bem equipado e com excelente conexão de internet para trabalho remoto, streaming e chamadas de vídeo.</text:p>
      <text:p text:style-name="P1"/>
      <text:p text:style-name="P3">⚠️ Avisos importantes</text:p>
      <text:list text:style-name="L1">
        <text:list-item>
          <text:p text:style-name="P4">Capacidade máxima: 4 hóspedes</text:p>
        </text:list-item>
        <text:list-item>
          <text:p text:style-name="P4">Não aceitamos pets</text:p>
        </text:list-item>
        <text:list-item>
          <text:p text:style-name="P4">Não é permitida a entrada de visitantes</text:p>
        </text:list-item>
        <text:list-item>
          <text:p text:style-name="P4">Não é permitido fumar no imóvel</text:p>
        </text:list-item>
        <text:list-item>
          <text:p text:style-name="P4">Não são permitidas crianças menores de 13 anos</text:p>
        </text:list-item>
        <text:list-item>
          <text:p text:style-name="P4">Roupa de cama não inclusa</text:p>
        </text:list-item>
        <text:list-item>
          <text:p text:style-name="P4">Serviço de praia não incluso</text:p>
        </text:list-item>
        <text:list-item>
          <text:p text:style-name="P4">Check-in: a partir das 15h</text:p>
        </text:list-item>
        <text:list-item>
          <text:p text:style-name="P4">Check-out: até as 12h</text:p>
        </text:list-item>
        <text:list-item>
          <text:p text:style-name="P4">Suporte para hóspedes em Português, Inglês e Espanhol</text:p>
        </text:list-item>
      </text:list>
      <text:p text:style-name="P1"/>
      <text:p text:style-name="P1"/>
      <text:p text:style-name="P2">O apartamento conta com:</text:p>
      <text:list text:style-name="L2">
        <text:list-item>
          <text:p text:style-name="P5">2 quartos confortáveis</text:p>
        </text:list-item>
        <text:list-item>
          <text:p text:style-name="P5">Sacada privativa</text:p>
        </text:list-item>
        <text:list-item>
          <text:p text:style-name="P5">Banheiro principal e banheiro de serviço</text:p>
        </text:list-item>
        <text:list-item>
          <text:p text:style-name="P5">Área de serviço</text:p>
        </text:list-item>
        <text:list-item>
          <text:p text:style-name="P5">Cozinha equipada</text:p>
        </text:list-item>
        <text:list-item>
          <text:p text:style-name="P5">Ar-condicionado no quarto principal</text:p>
        </text:list-item>
        <text:list-item>
          <text:p text:style-name="P5">Wi-Fi de alta velocidade</text:p>
        </text:list-item>
        <text:list-item>
          <text:p text:style-name="P5">Portaria 24 horas</text:p>
        </text:list-item>
        <text:list-item>
          <text:p text:style-name="P5">Vaga de garagem para carro popular</text:p>
        </text:list-item>
      </text:list>
      <text:p text:style-name="P1"/>
      <text:p text:style-name="P1">Configuração dos quartos:</text:p>
      <text:p text:style-name="P1"/>
      <text:p text:style-name="P1">Quarto principal</text:p>
      <text:p text:style-name="P1">• 1 cama de casal</text:p>
      <text:p text:style-name="P1"/>
      <text:p text:style-name="P1">Quarto secundário</text:p>
      <text:p text:style-name="P1">• 1 bicama (acomoda até 2 pessoas)</text:p>
      <text:p text:style-name="P1"/>
      <text:p text:style-name="P1">Para sua comodidade, disponibilizamos:</text:p>
      <text:p text:style-name="P1"/>
      <text:p text:style-name="P1"/>
      <text:list text:style-name="L3">
        <text:list-item>
          <text:p text:style-name="P6">Máquina de lavar louças</text:p>
        </text:list-item>
        <text:list-item>
          <text:p text:style-name="P6">Micro-ondas</text:p>
        </text:list-item>
        <text:list-item>
          <text:p text:style-name="P6">Air Fryer</text:p>
        </text:list-item>
        <text:list-item>
          <text:p text:style-name="P6">Frigobar</text:p>
        </text:list-item>
        <text:list-item>
          <text:p text:style-name="P6">Panelas, pratos, copos e talheres</text:p>
        </text:list-item>
        <text:list-item>
          <text:p text:style-name="P6">Secador de cabelo</text:p>
        </text:list-item>
        <text:list-item>
          <text:p text:style-name="P6">Água quente</text:p>
        </text:list-item>
        <text:list-item>
          <text:p text:style-name="P6">Varal retrátil</text:p>
        </text:list-item>
        <text:list-item>
          <text:p text:style-name="P6">Máquina de lavar roupas</text:p>
        </text:list-item>
        <text:list-item>
          <text:p text:style-name="P6">Ferro e tábua de passar roupas</text:p>
          <text:p text:style-name="P7">Localização privilegiada, próxima a diversas atrações da cidade:</text:p>
          <text:p text:style-name="P6"/>
        </text:list-item>
      </text:list>
      <text:p text:style-name="P1">📍 Praia da Enseada – 2 km</text:p>
      <text:p text:style-name="P1">📍 Boliche &amp; Pub Enseada – 2,2 km</text:p>
      <text:p text:style-name="P1">📍 Praia do Pernambuco – 5 km</text:p>
      <text:p text:style-name="P1">📍 Acqua Mundo – 5,1 km</text:p>
      <text:p text:style-name="P1">📍 Carrefour – 5,4 km</text:p>
      <text:p text:style-name="P1">📍 Restaurante e Pizzaria Brisa do Mar – 6 km</text:p>
      <text:p text:style-name="P1">📍 Alcides Pizzaria – 6,1 km</text:p>
      <text:p text:style-name="P1">📍 Praia das Pitangueiras – 6,5 km</text:p>
      <text:p text:style-name="P1">📍 Mirante do Morro do Maluf – 6,6 km</text:p>
      <text:p text:style-name="P1">📍 Centro do Guarujá – 7 km</text:p>
      <text:p text:style-name="P1">📍 Shopping La Plage – 7 km</text:p>
      <text:p text:style-name="P1">📍 Mirante das Galhetas – 10,1 km</text:p>
      <text:p text:style-name="P1">📍 Assaí Atacadista – 10,3 km</text:p>
      <text:list text:continue-numbering="true" text:style-name="L3">
        <text:list-header>
          <text:p text:style-name="P8">Uso dos interruptores:</text:p>
        </text:list-header>
      </text:list>
      <text:p text:style-name="P9"/>
      <text:p text:style-name="P9">Sala:</text:p>
      <text:p text:style-name="P9"/>
      <text:p text:style-name="P9">(foto interruptor da sala)</text:p>
      <text:p text:style-name="P9"/>
      <text:p text:style-name="P9">1 – Iluminação cozinha</text:p>
      <text:p text:style-name="P9">2 – Iluminação TV</text:p>
      <text:p text:style-name="P9">3 – Abajur do sofá</text:p>
      <text:p text:style-name="P9">4 – Sem uso</text:p>
      <text:p text:style-name="P9">5 – Ligar e regular intensidade da luz da mesa</text:p>
      <text:p text:style-name="P9"/>
      <text:p text:style-name="P9">(foto segundo interruptor da sala)</text:p>
      <text:p text:style-name="P9"/>
      <text:p text:style-name="P9">1 – Iluminação da sacada</text:p>
      <text:p text:style-name="P10">Primeiro quarto</text:p>
      <text:p text:style-name="P9"/>
      <text:p text:style-name="P9">(foto do dimmer do primeiro quarto)</text:p>
      <text:p text:style-name="P9"/>
      <text:p text:style-name="P9">1 – Ligar e regular intensidade da luz do quarto</text:p>
      <text:p text:style-name="P9">Abajures são ligados e desligados em seus respectivos cabos</text:p>
      <text:p text:style-name="P9"/>
      <text:p text:style-name="P9">(foto disjuntores na esquerda)</text:p>
      <text:p text:style-name="P9"/>
      <text:p text:style-name="P9">1 – Luz da cama</text:p>
      <text:p text:style-name="P9">2 – <text:span text:style-name="T1">Iluminação do quarto (atenção: Se a luz do quarto for desligada aqui, o dimmer não funcionará até que esse interruptor seja acionado novamente)</text:span></text:p>
      <text:p text:style-name="P9"/>
      <text:p text:style-name="P9"/>
      <text:p text:style-name="P10">Segundo quarto</text:p>
      <text:p text:style-name="P9"/>
      <text:p text:style-name="P9">(foto interruptores)</text:p>
      <text:p text:style-name="P9"/>
      <text:p text:style-name="P9">1 – Luz do quarto</text:p>
      <text:p text:style-name="P9">2 – Desligar ventilador do teto</text:p>
      <text:p text:style-name="P9">3 – Ligar ventilador do teto em velocidade baixa</text:p>
      <text:p text:style-name="P9">4 – Ligar ventilador do teto em velocidade média</text:p>
      <text:p text:style-name="P9">5 – Ligar ventilador do teto em velocidade alta</text:p>
      <text:p text:style-name="P9"/>
      <text:p text:style-name="P9">(foto controle destacado)</text:p>
      <text:p text:style-name="P9"/>
      <text:p text:style-name="P9">Esse controle pode ser destacado, lembre-se sempre de fixá-lo em seu local após o uso.</text:p>
      <text:p text:style-name="P9"/>
      <text:p text:style-name="P9">(Foto segundo interruptor)</text:p>
      <text:p text:style-name="P9"/>
      <text:p text:style-name="P9">1 – Iluminação luminária</text:p>
      <text:p text:style-name="P9"/>
      <text:p text:style-name="P11">Banheiro principal</text:p>
      <text:p text:style-name="P12"/>
      <text:p text:style-name="P12">(fotos dos interruptores do banheiro principal)</text:p>
      <text:p text:style-name="P12"/>
      <text:p text:style-name="P12">1 – Área do box</text:p>
      <text:p text:style-name="P12">2 – Área do espelho</text:p>
      <text:p text:style-name="P11">Corredor:</text:p>
      <text:p text:style-name="P12"/>
      <text:p text:style-name="P12">(foto do interruptor do corredor)</text:p>
      <text:p text:style-name="P12"/>
      <text:p text:style-name="P12">1 – Luz do corredor</text:p>
      <text:p text:style-name="P10">Área de serviço</text:p>
      <text:p text:style-name="P9"/>
      <text:p text:style-name="P9">(foto interruptores área de serviço)</text:p>
      <text:p text:style-name="P9"/>
      <text:p text:style-name="P9">1 – Iluminação área de serviço</text:p>
      <text:p text:style-name="P9"/>
      <text:p text:style-name="P9">Segundo banheiro</text:p>
      <text:p text:style-name="P9"/>
      <text:p text:style-name="P9">(foto interruptores segundo banheiro)</text:p>
      <text:p text:style-name="P9"/>
      <text:p text:style-name="P9">1 – Iluminação área da pia</text:p>
      <text:p text:style-name="P9">2 – Iluminação área do banho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22:02:43.916713558</meta:creation-date>
    <dc:date>2026-06-14T00:04:04.857658265</dc:date>
    <meta:editing-duration>PT17M1S</meta:editing-duration>
    <meta:editing-cycles>2</meta:editing-cycles>
    <meta:generator>LibreOffice/26.2.3.2$Linux_X86_64 LibreOffice_project/620$Build-2</meta:generator>
    <meta:document-statistic meta:table-count="0" meta:image-count="0" meta:object-count="0" meta:page-count="10" meta:paragraph-count="97" meta:word-count="535" meta:character-count="3070" meta:non-whitespace-character-count="2629"/>
  </office:meta>
</office:document-meta>
</file>